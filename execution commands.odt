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rsid="00062deb" officeooo:paragraph-rsid="00062deb"/>
    </style:style>
    <style:style style:name="P3" style:family="paragraph" style:parent-style-name="Standard">
      <style:text-properties officeooo:rsid="0009b8d1" officeooo:paragraph-rsid="0009b8d1"/>
    </style:style>
    <style:style style:name="P4" style:family="paragraph" style:parent-style-name="Standard">
      <style:text-properties officeooo:paragraph-rsid="0009b8d1"/>
    </style:style>
    <style:style style:name="P5" style:family="paragraph" style:parent-style-name="Standard">
      <style:text-properties officeooo:paragraph-rsid="000c621b"/>
    </style:style>
    <style:style style:name="P6" style:family="paragraph" style:parent-style-name="Text_20_body">
      <style:text-properties officeooo:rsid="00062deb" officeooo:paragraph-rsid="00062deb"/>
    </style:style>
    <style:style style:name="T1" style:family="text">
      <style:text-properties officeooo:rsid="0009b8d1"/>
    </style:style>
    <style:style style:name="T2" style:family="text">
      <style:text-properties officeooo:rsid="000c621b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o now do this from <text:span text:style-name="Source_20_Text">contrib/btree_gist</text:span>:</text:p>
      <text:section text:style-name="Sect1" text:name="code-block-viewer">
        <text:p text:style-name="P1">make clean</text:p>
        <text:p text:style-name="Preformatted_20_Text">make PG_CONFIG=/home/yash7312/Desktop/Sem6/DBIS/LAB/DBIS_project/postgresql/install/bin/pg_config</text:p>
        <text:p text:style-name="Preformatted_20_Text">make install PG_CONFIG=/home/yash7312/Desktop/Sem6/DBIS/LAB/DBIS_project/postgresql/install/bin/pg_config</text:p>
      </text:section>
      <text:p text:style-name="Text_20_body">Then verify:</text:p>
      <text:section text:style-name="Sect1" text:name="Section1">
        <text:p text:style-name="P1"><text:bookmark text:name="code-block-viewer"/>ls /home/yash7312/Desktop/Sem6/DBIS/LAB/DBIS_project/postgresql/install/share/extension | grep btree_gist</text:p>
        <text:p text:style-name="Preformatted_20_Text">ls /home/yash7312/Desktop/Sem6/DBIS/LAB/DBIS_project/postgresql/install/lib | grep btree_gist</text:p>
      </text:section>
      <text:p text:style-name="Text_20_body">If that still doesn’t place the files there, use the manual copy workaround from the same directory:</text:p>
      <text:section text:style-name="Sect1" text:name="Section2">
        <text:p text:style-name="P1"><text:bookmark text:name="code-block-viewer Copy 1"/>mkdir -p /home/yash7312/Desktop/Sem6/DBIS/LAB/DBIS_project/postgresql/install/share/extension</text:p>
        <text:p text:style-name="Preformatted_20_Text">mkdir -p /home/yash7312/Desktop/Sem6/DBIS/LAB/DBIS_project/postgresql/install/lib</text:p>
        <text:p text:style-name="Preformatted_20_Text">cp btree_gist.control /home/yash7312/Desktop/Sem6/DBIS/LAB/DBIS_project/postgresql/install/share/extension/</text:p>
        <text:p text:style-name="Preformatted_20_Text">cp btree_gist--*.sql /home/yash7312/Desktop/Sem6/DBIS/LAB/DBIS_project/postgresql/install/share/extension/</text:p>
        <text:p text:style-name="Preformatted_20_Text">cp btree_gist.so /home/yash7312/Desktop/Sem6/DBIS/LAB/DBIS_project/postgresql/install/lib/</text:p>
      </text:section>
      <text:p text:style-name="Standard"/>
      <text:p text:style-name="Standard"/>
      <text:p text:style-name="P2">After changes to any file</text:p>
      <text:p text:style-name="P2"/>
      <text:p text:style-name="P6">PostgreSQL source root:</text:p>
      <text:section text:style-name="Sect1" text:name="Section3">
        <text:p text:style-name="P1"><text:bookmark text:name="code-block-viewer Copy 2"/>cd ~/Desktop/Sem6/DBIS/LAB/DBIS_project/postgresql</text:p>
        <text:p text:style-name="Preformatted_20_Text">make -j</text:p>
        <text:p text:style-name="Preformatted_20_Text">make install</text:p>
      </text:section>
      <text:p text:style-name="P2"/>
      <text:p text:style-name="P2">Then do</text:p>
      <text:p text:style-name="P2">export POSTGRES_INSTALLDIR=/home/yash7312/Desktop/Sem6/DBIS/LAB/DBIS_project/postgresql/install</text:p>
      <text:p text:style-name="P2">export LD_LIBRARY_PATH=${POSTGRES_INSTALLDIR}/lib:${LD_LIBRARY_PATH}</text:p>
      <text:p text:style-name="P2">export PATH=${POSTGRES_INSTALLDIR}/bin:${PATH}</text:p>
      <text:p text:style-name="P2">export PGDATA=${POSTGRES_INSTALLDIR}/data<text:line-break/></text:p>
      <text:p text:style-name="P2">and go to install/bin</text:p>
      <text:p text:style-name="P2">and stop and rerun the server</text:p>
      <text:p text:style-name="P2">pg_ctl -D "$PGDATA" stop</text:p>
      <text:p text:style-name="P2"/>
      <text:p text:style-name="P2">pg_ctl -D "$PGDATA" -l "$POSTGRES_INSTALLDIR/logfile" start</text:p>
      <text:p text:style-name="P2"/>
      <text:p text:style-name="P2"/>
      <text:p text:style-name="P3">sometimes changes just doesn’t reflect since they are in different folder and we are using install/bin<text:line-break/>so just do is</text:p>
      <text:p text:style-name="P5"><text:span text:style-name="T1">this is for temporal cube</text:span></text:p>
      <text:p text:style-name="P5"><text:span text:style-name="T2">make clean || make || make install</text:span><text:span text:style-name="T1"><text:line-break/></text:span>mkdir -p ~/Desktop/Sem6/DBIS/LAB/DBIS_project/postgresql/install/share/extension<text:line-break/>mkdir -p ~/Desktop/Sem6/DBIS/LAB/DBIS_project/postgresql/install/lib<text:line-break/><text:soft-page-break/><text:line-break/>cp cube.control ~/Desktop/Sem6/DBIS/LAB/DBIS_project/postgresql/install/share/extension/<text:line-break/>cp cube--*.sql ~/Desktop/Sem6/DBIS/LAB/DBIS_project/postgresql/install/share/extension/<text:line-break/>cp cube.so ~/Desktop/Sem6/DBIS/LAB/DBIS_project/postgresql/install/lib/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4:41:51.908552801</meta:creation-date>
    <dc:date>2026-04-11T00:56:31.149300177</dc:date>
    <meta:editing-duration>PT26M2S</meta:editing-duration>
    <meta:editing-cycles>1</meta:editing-cycles>
    <meta:document-statistic meta:table-count="0" meta:image-count="0" meta:object-count="0" meta:page-count="2" meta:paragraph-count="30" meta:word-count="150" meta:character-count="2121" meta:non-whitespace-character-count="2001"/>
    <meta:generator>LibreOffice/24.2.7.2$Linux_X86_64 LibreOffice_project/420$Build-2</meta:generator>
  </office:meta>
</office:document-meta>
</file>